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00000014EFEAC0341.png" manifest:media-type="image/png"/>
  <manifest:file-entry manifest:full-path="Pictures/10000000000002400000014E675AF7FE.png" manifest:media-type="image/png"/>
  <manifest:file-entry manifest:full-path="Pictures/100000000000044B0000013FEB1D0493.png" manifest:media-type="image/png"/>
  <manifest:file-entry manifest:full-path="Pictures/10000000000004460000014432B11D15.png" manifest:media-type="image/png"/>
  <manifest:file-entry manifest:full-path="Pictures/100002010000028F000001E23FF21BEA6572D534.png" manifest:media-type="image/png"/>
  <manifest:file-entry manifest:full-path="Pictures/10000200000001CB000001256AAA88B0.gif" manifest:media-type="image/gif"/>
  <manifest:file-entry manifest:full-path="Pictures/1000020100000577000000D908A50E39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standard">
      <style:graphic-properties svg:stroke-color="#000000" draw:fill-color="#a40000" draw:textarea-horizontal-align="justify" draw:textarea-vertical-align="middle" draw:auto-grow-height="false" fo:min-height="0.602cm" fo:min-width="1.008cm"/>
    </style:style>
    <style:style style:name="gr4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602cm" fo:min-width="1.008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end"/>
      <style:text-properties fo:font-size="20pt" style:font-size-asian="20pt" style:font-size-complex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>
      <style:paragraph-properties fo:text-align="center"/>
      <style:text-properties fo:font-size="15.3000001907349pt"/>
    </style:style>
    <style:style style:name="P10" style:family="paragraph">
      <style:text-properties fo:font-size="40pt" style:font-size-asian="36pt" style:font-size-complex="36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ffffff" fo:font-size="44pt" style:font-size-asian="40pt" style:font-size-complex="40pt"/>
    </style:style>
    <style:style style:name="P13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color="#3333ff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style:font-name="Liberation Sans5" style:font-name-asian="Liberation Sans5" style:font-name-complex="Liberation Sans5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7.80000019073486pt"/>
    </style:style>
    <style:style style:name="T26" style:family="text">
      <style:text-properties fo:font-size="40pt" style:font-size-asian="36pt" style:font-size-complex="36pt"/>
    </style:style>
    <style:style style:name="T27" style:family="text">
      <style:text-properties fo:font-size="24pt" style:font-size-asian="22pt" style:font-size-complex="22pt"/>
    </style:style>
    <style:style style:name="T28" style:family="text">
      <style:text-properties fo:font-size="24pt" fo:font-style="italic" style:font-size-asian="22pt" style:font-style-asian="italic" style:font-size-complex="22pt" style:font-style-complex="italic"/>
    </style:style>
    <style:style style:name="T29" style:family="text">
      <style:text-properties style:font-name="Liberation Sans5" fo:font-size="40pt" style:font-name-asian="Liberation Sans5" style:font-size-asian="36pt" style:font-name-complex="Liberation Sans5" style:font-size-complex="36pt"/>
    </style:style>
    <style:style style:name="T30" style:family="text">
      <style:text-properties fo:color="#ffffff" fo:font-size="44pt" style:font-size-asian="40pt" style:font-size-complex="40pt"/>
    </style:style>
    <style:style style:name="T3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6-20">20.06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Vorstellung von uns beiden?</text:span></text:p>
              <text:p><text:span text:style-name="T5"/></text:p>
              <text:p><text:span text:style-name="T5">Einleitung: Ablösung von O(1) mit dem Ziel fairer zu Prozessen zu sein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 text:style-name="P5"><text:span text:style-name="T6">Completely Fair Scheduler (CFS) seit Kernel-Version 2.6.23</text:span></text:p>
                <text:list>
                  <text:list-item>
                    <text:p text:style-name="P5"><text:span text:style-name="T6">löste Vorgänger O(1) – Scheduler ab</text:span></text:p>
                    <text:p text:style-name="P5"><text:span text:style-name="T6"/></text:p>
                  </text:list-item>
                </text:list>
              </text:list-item>
              <text:list-item>
                <text:p text:style-name="P5"><text:span text:style-name="T6">O(1)-Scheduler bevorzugt über Heuristiken ermittelete interaktive Prozesse </text:span></text:p>
                <text:list>
                  <text:list-item>
                    <text:p text:style-name="P5"><text:span text:style-name="T6">Benachteligung Hintergrundprozesse möglich</text:span></text:p>
                    <text:p text:style-name="P5"><text:span text:style-name="T6"/></text:p>
                  </text:list-item>
                </text:list>
              </text:list-item>
              <text:list-item>
                <text:p text:style-name="P5"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 text:style-name="P5"><text:span text:style-name="T6">Allgemeine Definition:</text:span></text:p>
            <text:p text:style-name="P5"><text:span text:style-name="T6"/></text:p>
            <text:p text:style-name="P5"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6"><text:span text:style-name="T6">- Michael Pine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7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8" draw:layer="layout" svg:width="25.219cm" svg:height="5.501cm" svg:x="1.227cm" svg:y="5.496cm">
          <draw:text-box>
            <text:list text:style-name="L2">
              <text:list-item>
                <text:p text:style-name="P8"><text:span text:style-name="T10">Ressourcen</text:span><text:span text:style-name="T13"> </text:span><text:span text:style-name="T13"><text:tab/></text:span><text:span text:style-name="T13">→ </text:span><text:span text:style-name="T13"><text:tab/></text:span><text:span text:style-name="T13">Central Processing Unit (CPU)</text:span></text:p>
              </text:list-item>
              <text:list-item>
                <text:p text:style-name="P8"><text:span text:style-name="T10">Tasks</text:span><text:span text:style-name="T13"> </text:span><text:span text:style-name="T13"><text:tab/></text:span><text:span text:style-name="T13"><text:tab/></text:span><text:span text:style-name="T13"><text:tab/></text:span><text:span text:style-name="T13">→</text:span><text:span text:style-name="T13"><text:tab/></text:span><text:span text:style-name="T13">Prozesse</text:span><text:span text:style-name="T13"><text:tab/></text:span></text:p>
              </text:list-item>
              <text:list-item>
                <text:p text:style-name="P8"><text:span text:style-name="T10">Ziele</text:span><text:span text:style-name="T13"><text:tab/></text:span><text:span text:style-name="T13"><text:tab/></text:span><text:span text:style-name="T13"><text:tab/></text:span><text:span text:style-name="T13">→ </text:span><text:span text:style-name="T13"><text:tab/></text:span><text:span text:style-name="T13">hoher Durchsatz, hohe Effizienz, geringe Komplexität </text:span></text:p>
              </text:list-item>
            </text:list>
            <text:p text:style-name="P8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und </text:span><text:span text:style-name="T14">Fairness!</text:span></text:p>
          </draw:text-box>
        </draw:frame>
        <draw:frame draw:style-name="gr2" draw:text-style-name="P8" draw:layer="layout" svg:width="24.066cm" svg:height="3.179cm" svg:x="0.986cm" svg:y="13.321cm">
          <draw:text-box>
            <text:list text:style-name="L2">
              <text:list-item>
                <text:p text:style-name="P8"><text:span text:style-name="T15">Fairness: </text:span></text:p>
                <text:p text:style-name="P8"><text:span text:style-name="T16">Jeder Prozess sollte anteilig die gleiche Prozessorzeit zugewiesen bekommen und nicht verhunger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Außerdem einfach und schnell</text:p>
              <text:p>In OS nicht ganz so wichtig: Deadlines</text:p>
              <text:p/>
              <text:p>Effizienz und Durchsatz maximieren, Abarbeitungs- &amp; Antwortzeiten (OS!) minimieren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7">Completely-Fair Prinzip</text:span></text:p>
          </draw:text-box>
        </draw:frame>
        <draw:frame presentation:style-name="pr2" draw:text-style-name="P5" draw:layer="layout" svg:width="25.2cm" svg:height="12.179cm" svg:x="1.4cm" svg:y="5.066cm" presentation:class="outline">
          <draw:text-box>
            <text:list text:style-name="L2">
              <text:list-item>
                <text:p xml:id="id7" text:id="id7" text:style-name="P5"><text:span text:style-name="T6">auch <text:s/></text:span><text:span text:style-name="T18">Proportional-Share-Scheduling</text:span></text:p>
              </text:list-item>
              <text:list-item>
                <text:p xml:id="id8" text:id="id8" text:style-name="P5"><text:span text:style-name="T6">Jeder Klient mit gerechtem Anteil an Ressource <text:s/></text:span></text:p>
              </text:list-item>
              <text:list-item>
                <text:p xml:id="id9" text:id="id9" text:style-name="P5"><text:span text:style-name="T6">Klienten werden bewertet</text:span></text:p>
                <text:list>
                  <text:list-item>
                    <text:p xml:id="id10" text:id="id10" text:style-name="P5"><text:span text:style-name="T6">Bereits verbrauchtes Kontingent / Kontingent aller Klienten in einer bestimmten Zeit</text:span></text:p>
                    <text:p xml:id="id11" text:id="id11" text:style-name="P5"><text:span text:style-name="T6"/></text:p>
                    <text:p text:style-name="P5"><text:span text:style-name="T6"/></text:p>
                  </text:list-item>
                  <text:list-item>
                    <text:p text:style-name="P5"><text:span text:style-name="T6">Daraus ergibt sich eine prozentuale Berechtigung zur weiteren Nutzung der Ressourc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2.179cm" svg:x="1.4cm" svg:y="5.066cm" presentation:class="outline">
          <draw:text-box>
            <text:list text:style-name="L2">
              <text:list-item>
                <text:p xml:id="id12" text:id="id12" text:style-name="P5"><text:span text:style-name="T6">Grundidee: Fairness/Gleichgewicht bei Zuteilung von Prozessorzeit wahren</text:span></text:p>
                <text:list>
                  <text:list-item>
                    <text:p xml:id="id13" text:id="id13"><text:span text:style-name="T6">Prozesse erhalten angemessenen Anteil an CPU in Form von Zeitscheiben</text:span></text:p>
                  </text:list-item>
                  <text:list-item>
                    <text:p xml:id="id14" text:id="id14"><text:span text:style-name="T6">Wenn Zeit für Prozess aus Gleichgewicht, dann diesem Zeit zum Ausführen geben</text:span></text:p>
                  </text:list-item>
                </text:list>
                <text:p text:style-name="P5"><text:span text:style-name="T6"/></text:p>
              </text:list-item>
              <text:list-item>
                <text:p text:style-name="P5"><text:span text:style-name="T6">Zeitscheiben werden anhand Gewicht berechnet</text:span></text:p>
                <text:list>
                  <text:list-item>
                    <text:p><text:span text:style-name="T6">Gewicht berechnet aus </text:span><text:span text:style-name="T9">nice</text:span><text:span text:style-name="T6">-Wert (Intervall [-20;19] ) </text:span></text:p>
                  </text:list-item>
                  <text:list-item>
                    <text:p><text:span text:style-name="T6">Gewicht ≍ 1024/(1.25)^(</text:span><text:span text:style-name="T9">nice</text:span><text:span text:style-name="T6">)</text:span></text:p>
                  </text:list-item>
                </text:list>
                <text:p text:style-name="P5"><text:span text:style-name="T6"/></text:p>
              </text:list-item>
              <text:list-item>
                <text:p text:style-name="P5"><text:span text:style-name="T6">Um Gleichgewicht zu wahren, wird die Ausführungszeit pro Prozess summiert</text:span></text:p>
                <text:list>
                  <text:list-item>
                    <text:p><text:span text:style-name="T9">virtual runtim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15" text:id="id15">Wichtige Parameter </text:p>
                <text:list>
                  <text:list-item>
                    <text:p xml:id="id16" text:id="id16"><text:span text:style-name="T19">vruntime</text:span></text:p>
                    <text:list>
                      <text:list-item>
                        <text:p xml:id="id17" text:id="id17"><text:span text:style-name="T20">Bereits ausgeführte Zeit / eigenes Gewicht</text:span></text:p>
                      </text:list-item>
                      <text:list-item>
                        <text:p xml:id="id18" text:id="id18"><text:span text:style-name="T20">Inkrementell für Dauer der Ausführung wachsend</text:span></text:p>
                      </text:list-item>
                    </text:list>
                  </text:list-item>
                  <text:list-item>
                    <text:p xml:id="id19" text:id="id19"><text:span text:style-name="T21">slice</text:span></text:p>
                    <text:list>
                      <text:list-item>
                        <text:p xml:id="id20" text:id="id20"><text:span text:style-name="T20">Eigenes Gewicht / Summe aller Gewichte </text:span></text:p>
                      </text:list-item>
                      <text:list-item>
                        <text:p xml:id="id21" text:id="id21"><text:span text:style-name="T20">Prozentualer Anteil für eine bestimmte Periodenlänge</text:span></text:p>
                      </text:list-item>
                      <text:list-item>
                        <text:p xml:id="id22" text:id="id22"><text:span text:style-name="T20">Festlegung einer Mindestlänge</text:span></text:p>
                      </text:list-item>
                    </text:list>
                  </text:list-item>
                </text:list>
              </text:list-item>
              <text:list-item>
                <text:p xml:id="id23" text:id="id23"><text:span text:style-name="T21">vruntime </text:span><text:span text:style-name="T20">zur Auswahl des nächsten Prozesses</text:span></text:p>
              </text:list-item>
              <text:list-item>
                <text:p xml:id="id24" text:id="id24"><text:span text:style-name="T21">slice</text:span><text:span text:style-name="T20"> zur Bestimmung der zuzuteilenden Länge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unktionsweise CFS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 xml:id="id25" text:id="id25">Ablauf</text:p>
                <text:list>
                  <text:list-item>
                    <text:p xml:id="id26" text:id="id26"><text:span text:style-name="T19">vruntime</text:span> wir mit Hilfe eines Rot-Schwarz-Baumes verwaltet</text:p>
                  </text:list-item>
                  <text:list-item>
                    <text:p xml:id="id27" text:id="id27">Element ganz links im Baum erhält die nächste Zuteilung </text:p>
                  </text:list-item>
                  <text:list-item>
                    <text:p xml:id="id28" text:id="id28">Die berechtigte Länge (Zeitscheibe) ergibt sich aus dem <text:span text:style-name="T19">slice</text:span><text:span text:style-name="T22">-Wert</text:span></text:p>
                  </text:list-item>
                  <text:list-item>
                    <text:p xml:id="id29" text:id="id29"><text:span text:style-name="T22">Nach Ablauf der Periode sollen alle entsprechenden </text:span><text:span text:style-name="T19">vruntime </text:span><text:span text:style-name="T22">Werte gleich hoch sei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Rot-Schwarz-Baum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2">
              <text:list-item>
                <text:p xml:id="id30" text:id="id30"><text:span text:style-name="T23">Eigenschaften</text:span></text:p>
                <text:list>
                  <text:list-item>
                    <text:p xml:id="id31" text:id="id31">Erweiterung eines binären Suchbaums</text:p>
                  </text:list-item>
                  <text:list-item>
                    <text:p xml:id="id32" text:id="id32">Kürzere Laufzeit <text:span text:style-name="T19">O(log n)</text:span> im Vergleich zur sequentiellen Liste O(<text:span text:style-name="T19">n</text:span>)</text:p>
                  </text:list-item>
                  <text:list-item>
                    <text:p xml:id="id33" text:id="id33">Selbst balancierend durch definierte Einfüge-Lösch-Operationen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69cm" svg:x="1.4cm" svg:y="0.649cm" presentation:class="title" presentation:user-transformed="true">
          <draw:text-box>
            <text:p>Rot-Schwarz-Baum<text:line-break/><text:span text:style-name="T17">└</text:span>Binärer Suchbau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 xml:id="id34" text:id="id34"><text:span text:style-name="T24">Baum mit 2 Kindern</text:span></text:p>
              </text:list-item>
              <text:list-item>
                <text:p xml:id="id35" text:id="id35"><text:span text:style-name="T23">Vorgehen beim Suchen</text:span></text:p>
                <text:list>
                  <text:list-item>
                    <text:p xml:id="id36" text:id="id36">Vergleich mit Wurzelelement </text:p>
                  </text:list-item>
                </text:list>
              </text:list-item>
            </text:list>
          </draw:text-box>
        </draw:frame>
        <draw:g xml:id="id37" draw:id="id37">
          <draw:custom-shape draw:style-name="gr3" draw:text-style-name="P9" xml:id="id1" draw:id="id1" draw:layer="layout" svg:width="1.6cm" svg:height="0.944cm" svg:x="12.489cm" svg:y="14.037cm">
            <text:p text:style-name="P1"><text:span text:style-name="T25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1" draw:layer="layout" svg:x1="13.299cm" svg:y1="11.867cm" svg:x2="13.299cm" svg:y2="13.921cm">
            <text:p/>
          </draw:line>
          <draw:custom-shape draw:style-name="gr3" draw:text-style-name="P9" xml:id="id2" draw:id="id2" draw:layer="layout" svg:width="1.6cm" svg:height="0.944cm" svg:x="10.39cm" svg:y="15.538cm">
            <text:p text:style-name="P1"><text:span text:style-name="T25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9" xml:id="id3" draw:id="id3" draw:layer="layout" svg:width="1.6cm" svg:height="0.944cm" svg:x="14.591cm" svg:y="15.539cm">
            <text:p text:style-name="P1"><text:span text:style-name="T25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9" xml:id="id4" draw:id="id4" draw:layer="layout" svg:width="1.6cm" svg:height="0.944cm" svg:x="9.292cm" svg:y="17.04cm">
            <text:p text:style-name="P1"><text:span text:style-name="T25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9" xml:id="id5" draw:id="id5" draw:layer="layout" svg:width="1.6cm" svg:height="0.944cm" svg:x="15.693cm" svg:y="17.041cm">
            <text:p text:style-name="P1"><text:span text:style-name="T25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" draw:layer="layout" svg:x1="12.489cm" svg:y1="14.509cm" svg:x2="11.19cm" svg:y2="15.538cm" draw:start-shape="id1" draw:start-glue-point="3" draw:end-shape="id2" draw:end-glue-point="0" svg:d="M12489 14509h-1299v1029" svg:viewBox="0 0 1300 1030">
            <text:p/>
          </draw:connector>
          <draw:connector draw:style-name="gr5" draw:text-style-name="P1" draw:layer="layout" svg:x1="14.089cm" svg:y1="14.509cm" svg:x2="15.391cm" svg:y2="15.539cm" draw:start-shape="id1" draw:end-shape="id3" draw:end-glue-point="0" svg:d="M14089 14509h1302v1030" svg:viewBox="0 0 1303 1031">
            <text:p/>
          </draw:connector>
          <draw:connector draw:style-name="gr5" draw:text-style-name="P1" draw:layer="layout" svg:x1="10.39cm" svg:y1="16.01cm" svg:x2="10.092cm" svg:y2="17.04cm" draw:start-shape="id2" draw:start-glue-point="3" draw:end-shape="id4" draw:end-glue-point="0" svg:d="M10390 16010h-298v1030" svg:viewBox="0 0 299 1031">
            <text:p/>
          </draw:connector>
          <draw:connector draw:style-name="gr5" draw:text-style-name="P1" draw:layer="layout" svg:x1="16.191cm" svg:y1="16.011cm" svg:x2="16.493cm" svg:y2="17.041cm" draw:start-shape="id3" draw:start-glue-point="1" draw:end-shape="id5" draw:end-glue-point="0" svg:d="M16191 16011h302v1030" svg:viewBox="0 0 303 1031">
            <text:p/>
          </draw:connector>
          <draw:custom-shape draw:style-name="gr3" draw:text-style-name="P9" xml:id="id6" draw:id="id6" draw:layer="layout" svg:width="1.6cm" svg:height="0.944cm" svg:x="13.494cm" svg:y="17.042cm">
            <text:p text:style-name="P1"><text:span text:style-name="T25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" draw:layer="layout" svg:x1="14.591cm" svg:y1="16.011cm" svg:x2="14.294cm" svg:y2="17.042cm" draw:start-shape="id3" draw:start-glue-point="3" draw:end-shape="id6" draw:end-glue-point="0" svg:d="M14591 16011h-297v1031" svg:viewBox="0 0 298 1032">
            <text:p/>
          </draw:connector>
          <draw:custom-shape draw:style-name="gr6" draw:text-style-name="P9" draw:layer="layout" svg:width="1.6cm" svg:height="0.944cm" svg:x="12.49cm" svg:y="10.738cm">
            <text:p text:style-name="P1"><text:span text:style-name="T2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 xml:id="id38" text:id="id38">Jedes Element bekommt ein zusätzliches Farbattribut (rot / schwarz)</text:p>
              </text:list-item>
              <text:list-item>
                <text:p xml:id="id39" text:id="id39">Bestimmte Regeln einhalten</text:p>
              </text:list-item>
              <text:list-item>
                <text:p xml:id="id40" text:id="id40">Dazu passend Operationen für z.B. Einfügen, Löschen oder Suchen</text:p>
              </text:list-item>
              <text:list-item>
                <text:p xml:id="id41" text:id="id41">Dadurch kann ein Gleichgewicht garanti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draw:style-name="gr7" draw:text-style-name="P1" draw:layer="layout" svg:width="16.55cm" svg:height="12.179cm" svg:x="5.725cm" svg:y="5.065cm" presentation:class="graphic" presentation:user-transformed="true">
          <draw:image xlink:href="Pictures/100002010000028F000001E23FF21BEA6572D53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draw:style-name="gr8" draw:text-style-name="P1" draw:layer="layout" svg:width="15.832cm" svg:height="10.106cm" svg:x="6.137cm" svg:y="6.348cm">
          <draw:image xlink:href="Pictures/10000200000001CB000001256AAA88B0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0" draw:layer="layout" svg:width="19.5cm" svg:height="3.467cm" svg:x="1.4cm" svg:y="0.8cm" presentation:class="title">
          <draw:text-box>
            <text:p><text:span text:style-name="T26">Vergleich zum O(1)-Scheduler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p>Vergleiche hinsichtlich</text:p>
            <text:list text:style-name="L2">
              <text:list-item>
                <text:p>Fairness</text:p>
                <text:list>
                  <text:list-item>
                    <text:p><text:span text:style-name="T27">Wie gleich verteilt der Scheduler die CPU unter </text:span><text:span text:style-name="T28">N</text:span><text:span text:style-name="T27"> Prozesse</text:span></text:p>
                  </text:list-item>
                </text:list>
              </text:list-item>
              <text:list-item>
                <text:p>Latenz</text:p>
                <text:list>
                  <text:list-item>
                    <text:p><text:span text:style-name="T27">Zeit zwischen Anfordern der CPU und dem tatsächlichen erha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0" draw:layer="layout" svg:width="19.5cm" svg:height="3.467cm" svg:x="1.4cm" svg:y="0.8cm" presentation:class="title" presentation:user-transformed="true">
          <draw:text-box>
            <text:p><text:span text:style-name="T26">Vergleich zum O(1)-Scheduler</text:span><text:span text:style-name="T26"><text:line-break/></text:span><text:span text:style-name="T29">└ Fairness</text:span></text:p>
          </draw:text-box>
        </draw:frame>
        <draw:frame draw:style-name="gr9" draw:text-style-name="P1" draw:layer="layout" svg:width="24.877cm" svg:height="7.367cm" svg:x="1.023cm" svg:y="5.149cm">
          <draw:image xlink:href="Pictures/10000000000004460000014432B11D15.png" xlink:type="simple" xlink:show="embed" xlink:actuate="onLoad">
            <text:p/>
          </draw:image>
        </draw:frame>
        <draw:frame draw:style-name="gr9" draw:text-style-name="P1" draw:layer="layout" svg:width="24.762cm" svg:height="7.187cm" svg:x="1.123cm" svg:y="12.75cm">
          <draw:image xlink:href="Pictures/100000000000044B0000013FEB1D049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layer="layout" svg:width="17cm" svg:height="14cm" svg:x="2cm" svg:y="13cm" presentation:class="notes" presentation:user-transformed="true">
            <draw:text-box>
              <text:p>Resultate erklären</text:p>
              <text:p/>
              <text:p>Untersch. Zeitpunkte → Weite Streuung O(1) <text:s/>→ weniger Fairness</text:p>
              <text:p/>
              <text:p>CFS → starke Konzentration, um einen Wert, perfekte Fairness kann es nicht geben</text:p>
            </draw:text-box>
          </draw:frame>
        </presentation:notes>
      </draw:page>
      <draw:page draw:name="page1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0" draw:layer="layout" svg:width="19.5cm" svg:height="3.467cm" svg:x="1.4cm" svg:y="0.8cm" presentation:class="title" presentation:user-transformed="true">
          <draw:text-box>
            <text:p><text:span text:style-name="T26">Vergleich zum O(1)-Scheduler</text:span><text:span text:style-name="T26"><text:line-break/></text:span><text:span text:style-name="T26">- Latenz</text:span></text:p>
          </draw:text-box>
        </draw:frame>
        <draw:frame draw:style-name="gr9" draw:text-style-name="P1" draw:layer="layout" svg:width="11.655cm" svg:height="6.758cm" svg:x="0.936cm" svg:y="7.976cm">
          <draw:image xlink:href="Pictures/10000000000002400000014E675AF7FE.png" xlink:type="simple" xlink:show="embed" xlink:actuate="onLoad">
            <text:p/>
          </draw:image>
        </draw:frame>
        <draw:frame draw:style-name="gr9" draw:text-style-name="P1" draw:layer="layout" svg:width="11.512cm" svg:height="6.675cm" svg:x="13.734cm" svg:y="8.072cm">
          <draw:image xlink:href="Pictures/10000000000002400000014EFEAC034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Latenz trotzdem weit unter menschl Wahrnehmung</text:p>
              <text:p>→ beide sind gut</text:p>
            </draw:text-box>
          </draw:frame>
        </presentation:notes>
      </draw:page>
      <draw:page draw:name="page17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2" draw:layer="layout" svg:width="19.5cm" svg:height="3.467cm" svg:x="0.589cm" svg:y="0.696cm" presentation:class="title" presentation:user-transformed="true">
          <draw:text-box>
            <text:p text:style-name="P11"><text:span text:style-name="T30">Diskussion</text:span></text:p>
          </draw:text-box>
        </draw:frame>
        <draw:frame presentation:style-name="pr2" draw:text-style-name="P13" draw:layer="layout" svg:width="19.63cm" svg:height="4.557cm" svg:x="4.797cm" svg:y="9.34cm" presentation:class="outline" presentation:user-transformed="true">
          <draw:text-box>
            <text:p text:style-name="P1"><text:span text:style-name="T31">Fragen?</text:span></text:p>
            <text:p text:style-name="P1"><text:span text:style-name="T31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3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7000000D908A50E39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7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4.2.8.2$Linux_X86_64 LibreOffice_project/420m0$Build-2</meta:generator>
    <dc:title>Bright Blue</dc:title>
    <meta:document-statistic meta:object-count="108"/>
  </office:meta>
</office:document-meta>
</file>